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/>
    <style:font-face style:name="Georgia1" svg:font-family="Georgia" style:font-family-generic="roman" style:font-pitch="variable"/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>
      <loext:graphic-properties draw:fill="none" draw:fill-color="#ffffff" draw:opacity="100%"/>
      <style:paragraph-properties fo:margin-top="0cm" fo:margin-bottom="0.499cm" style:contextual-spacing="false" fo:background-color="transparent"/>
    </style:style>
    <style:style style:name="P5" style:family="paragraph" style:parent-style-name="Standard">
      <style:paragraph-properties fo:margin-top="0cm" fo:margin-bottom="0.499cm" style:contextual-spacing="false"/>
    </style:style>
    <style:style style:name="P6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0b6325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8cb7d" style:font-size-asian="10pt" style:font-size-complex="10pt"/>
    </style:style>
    <style:style style:name="T3" style:family="text">
      <style:text-properties fo:font-weight="bold" officeooo:rsid="0008cb7d" style:font-weight-asian="bold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0ec192" fo:background-color="#ffff00" loext:char-shading-value="0"/>
    </style:style>
    <style:style style:name="T7" style:family="text">
      <style:text-properties officeooo:rsid="000ec192" fo:background-color="#ffff00" loext:char-shading-value="0"/>
    </style:style>
    <style:style style:name="T8" style:family="text">
      <style:text-properties officeooo:rsid="000b6325"/>
    </style:style>
    <style:style style:name="T9" style:family="text">
      <style:text-properties style:font-name="Georgia1" officeooo:rsid="000b6325"/>
    </style:style>
    <style:style style:name="T10" style:family="text">
      <style:text-properties style:font-name="Georgia1" officeooo:rsid="000b6325" fo:background-color="#ffff00" loext:char-shading-value="0"/>
    </style:style>
    <style:style style:name="T11" style:family="text">
      <style:text-properties style:font-name="Georgia1" officeooo:rsid="000b6325" fo:background-color="#ffff00" loext:char-shading-value="0"/>
    </style:style>
    <style:style style:name="T12" style:family="text">
      <style:text-properties style:font-name="Georgia1" officeooo:rsid="000ec192" fo:background-color="#ffff00" loext:char-shading-value="0"/>
    </style:style>
    <style:style style:name="T13" style:family="text">
      <style:text-properties style:font-name="Georgia1" fo:font-size="8pt" officeooo:rsid="000b6325" style:font-size-asian="8pt" style:font-size-complex="8pt"/>
    </style:style>
    <style:style style:name="T14" style:family="text">
      <style:text-properties style:font-name="Georgia1" fo:font-size="9pt" officeooo:rsid="000b6325" style:font-size-asian="9pt" style:font-size-complex="9pt"/>
    </style:style>
    <style:style style:name="T15" style:family="text">
      <style:text-properties style:font-name="Georgia1" fo:font-size="9pt" officeooo:rsid="000b6325" fo:background-color="#ffff00" loext:char-shading-value="0" style:font-size-asian="9pt" style:font-size-complex="9pt"/>
    </style:style>
    <style:style style:name="T16" style:family="text">
      <style:text-properties style:font-name="Georgia1" fo:font-size="9pt" officeooo:rsid="000b6325" fo:background-color="#ffff00" loext:char-shading-value="0" style:font-size-asian="9pt" style:font-size-complex="9pt"/>
    </style:style>
    <style:style style:name="T17" style:family="text">
      <style:text-properties officeooo:rsid="000ec192"/>
    </style:style>
    <style:style style:name="T18" style:family="text">
      <style:text-properties fo:background-color="transparent" loext:char-shading-value="0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<text:file-name text:display="path">/home/tore/Arbeten/mish/</text:file-name></text:span><text:span text:style-name="T1"><text:file-name text:display="name-and-extension">old_dependencies_chatgpt.odt</text:file-name></text:span></text:p>
      <text:p text:style-name="P6"><text:span text:style-name="T3">Example of resolved early execution error through ChatGPT Ember Assistant <text:s/></text:span></text:p>
      <text:p text:style-name="P6"><text:a xlink:type="simple" xlink:href="https://chatgpt.com/g/g-NlX2z2g6H-ember-assistant" office:target-frame-name="_blank" xlink:show="new" text:style-name="Internet_20_link" text:visited-style-name="Visited_20_Internet_20_Link"><text:span text:style-name="T1">https://chatgpt.com/g/g-NlX2z2g6H-ember-assistant</text:span></text:a></text:p>
      <text:p text:style-name="P5">Thanks! The removal from package.json of ember-context-menu@0.5.2 did it! </text:p>
      <text:p text:style-name="Text_20_body">Excellent — that fits the evidence almost perfectly.</text:p>
      <text:p text:style-name="Text_20_body">The key clue was:</text:p>
      <text:section text:style-name="Sect1" text:name="code-block-viewer">
        <text:p text:style-name="P1"><text:span text:style-name="Source_20_Text">TypeError: Cannot read properties of undefined (reading 'templateCompiler')</text:span></text:p>
        <text:p text:style-name="P3"><text:span text:style-name="Source_20_Text"><text:s text:c="4"/>at ember-cli-htmlbars@4.5.0<text:tab/><text:tab/><text:tab/> <text:s text:c="2"/></text:span><text:span text:style-name="Source_20_Text"><text:span text:style-name="T11">in: </text:span></text:span><text:span text:style-name="Source_20_Text"><text:span text:style-name="T16">ERROR S</text:span></text:span><text:span text:style-name="Source_20_Text"><text:span text:style-name="T11">ummary of error.log</text:span></text:span></text:p>
      </text:section>
      <text:p text:style-name="Text_20_body">combined with:</text:p>
      <text:section text:style-name="Sect1" text:name="Område1">
        <text:p text:style-name="P1"><text:bookmark text:name="code-block-viewer"/><text:span text:style-name="Source_20_Text">ember-context-menu@0.5.2</text:span></text:p>
        <text:p text:style-name="P4"><text:span text:style-name="Source_20_Text">└── ember-cli-htmlbars@4.5.0<text:tab/><text:tab/><text:tab/><text:tab/><text:tab/></text:span><text:span text:style-name="Source_20_Text"><text:span text:style-name="T12">from: pnpm why &lt;package&gt;</text:span></text:span></text:p>
      </text:section>
      <text:p text:style-name="Text_20_body">Once we saw that <text:span text:style-name="Source_20_Text">ember-context-menu</text:span> was the <text:span text:style-name="Emphasis">only</text:span> thing pulling in the crashing <text:span text:style-name="Source_20_Text">ember-cli-htmlbars@4.5.0</text:span>, it became the prime suspect.</text:p>
      <text:p text:style-name="Text_20_body">A few takeaways for future Ember 7 / Vite / Embroider upgrades:</text:p>
      <text:list text:style-name="L1">
        <text:list-item>
          <text:p text:style-name="P8">Old addons are often the hidden source of build failures after a clean reinstall. </text:p>
        </text:list-item>
        <text:list-item>
          <text:p text:style-name="P8"><text:span text:style-name="Source_20_Text"><text:span text:style-name="T18">pnpm why &lt;package&gt;</text:span></text:span> is one of the most effective debugging tools for Ember dependency issues. </text:p>
        </text:list-item>
        <text:list-item>
          <text:p text:style-name="P8">Multiple versions of <text:span text:style-name="Source_20_Text">@glimmer/syntax</text:span> or <text:span text:style-name="Source_20_Text">ember-cli-htmlbars</text:span> are not automatically a problem; the important question is <text:span text:style-name="Emphasis">which addon is pulling them in</text:span>. </text:p>
        </text:list-item>
        <text:list-item>
          <text:p text:style-name="P7">Very old addons that implement classic Ember CLI hooks (<text:span text:style-name="Source_20_Text">included()</text:span>, template compiler access, Broccoli integration, etc.) are common failure points when moving to Ember 7 and modern Vite-based builds. </text:p>
        </text:list-item>
      </text:list>
      <text:p text:style-name="Text_20_body">Since <text:span text:style-name="Source_20_Text">ember-context-menu</text:span> was removed successfully, I'd also recommend checking for other similarly old packages:</text:p>
      <text:section text:style-name="Sect1" text:name="Område2">
        <text:p text:style-name="P2"><text:bookmark text:name="code-block-viewer kopiera 1"/><text:span text:style-name="Source_20_Text">pnpm outdated</text:span></text:p>
      </text:section>
      <text:p text:style-name="Text_20_body">and perhaps:</text:p>
      <text:section text:style-name="Sect1" text:name="Område3">
        <text:p text:style-name="P1"><text:bookmark text:name="code-block-viewer kopiera 2"/><text:span text:style-name="Source_20_Text">pnpm why ember-wormhole</text:span></text:p>
        <text:p text:style-name="P3"><text:span text:style-name="Source_20_Text">pnpm why ember-font-awesome<text:tab/><text:tab/></text:span><text:span text:style-name="Source_20_Text"><text:span text:style-name="T11">in package.json: </text:span></text:span><text:span text:style-name="Source_20_Text"><text:span text:style-name="T12">none</text:span></text:span></text:p>
      </text:section>
      <text:p text:style-name="Text_20_body">Both appeared in the same dependency neighborhood and may deserve a review during modernization.</text:p>
      <text:p text:style-name="Text_20_body">Glad you found it. This was a good example of using the stack trace to work backward from the crashing package instead of chasing the symptom (<text:span text:style-name="Source_20_Text">templateCompiler</text:span>)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/>
    <style:font-face style:name="Georgia1" svg:font-family="Georgia" style:font-family-generic="roman" style:font-pitch="variable"/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7T12:46:29.460082296</meta:creation-date>
    <dc:date>2026-06-07T13:21:43.351224833</dc:date>
    <meta:editing-duration>PT14M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24" meta:word-count="238" meta:character-count="1749" meta:non-whitespace-character-count="1517"/>
  </office:meta>
</office:document-meta>
</file>