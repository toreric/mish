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/>
    <style:font-face style:name="Georgia1" svg:font-family="Georgia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paragraph-rsid="0012110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4pt" fo:font-weight="bold" officeooo:rsid="000dfb82" officeooo:paragraph-rsid="000eb57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urier New" fo:font-size="14pt" fo:font-weight="bold" officeooo:rsid="000dfb82" officeooo:paragraph-rsid="000eb57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Georgia1" fo:font-size="10pt" fo:font-weight="normal" officeooo:rsid="000dfb82" officeooo:paragraph-rsid="000eb579" style:font-size-asian="10pt" style:font-weight-asian="normal" style:font-size-complex="10pt" style:font-weight-complex="normal"/>
    </style:style>
    <style:style style:name="T1" style:family="text">
      <style:text-properties officeooo:rsid="000eb579"/>
    </style:style>
    <style:style style:name="T2" style:family="text">
      <style:text-properties officeooo:rsid="0010af27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0eb579" style:font-size-asian="13pt" style:font-size-complex="13pt"/>
    </style:style>
    <style:style style:name="T5" style:family="text">
      <style:text-properties fo:font-size="13pt" officeooo:rsid="000f7f0b" style:font-size-asian="13pt" style:font-size-complex="13pt"/>
    </style:style>
    <style:style style:name="T6" style:family="text">
      <style:text-properties fo:font-size="13pt" officeooo:rsid="0013d7d7" style:font-size-asian="13pt" style:font-size-complex="13pt"/>
    </style:style>
    <style:style style:name="T7" style:family="text">
      <style:text-properties officeooo:rsid="00121101"/>
    </style:style>
    <style:style style:name="T8" style:family="text">
      <style:text-properties officeooo:rsid="0014a714"/>
    </style:style>
    <style:style style:name="T9" style:family="text">
      <style:text-properties officeooo:rsid="0015c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file-name text:display="path">/home/tore/Arbeten/mish/</text:file-name><text:file-name text:display="name-and-extension">explain_doLinkMove.odt</text:file-name></text:p>
      <text:p text:style-name="P3"/>
      <text:p text:style-name="P3"/>
      <text:p text:style-name="P3"><text:span text:style-name="T3">This is </text:span><text:span text:style-name="T4">a</text:span><text:span text:style-name="T3"> clarified content of </text:span><text:span text:style-name="T5">a</text:span><text:span text:style-name="T3"> ’cmd’ string in the ’moveto’ section of the ’doLinkMove’ function in the ’ChooseAlbum’ </text:span><text:span text:style-name="T6">component in ’menu-image.gjs’ file</text:span><text:span text:style-name="T3"> of the ’Mish’ project <text:line-break/></text:span><text:span text:style-name="T4">when moving ’fladdermus.gif’ from ’Album-1/nytt_album’ to <text:line-break/>’Album-1/nytt_album/Exempel’</text:span><text:span text:style-name="T1"> </text:span></text:p>
      <text:p text:style-name="P4"/>
      <text:p text:style-name="P1"/>
      <text:p text:style-name="P1">picfound=§Found_images.ge18;</text:p>
      <text:p text:style-name="P1">move=/home/tore/Album-1/nytt_album/fladdermus.gif; <text:s text:c="6"/><text:span text:style-name="T2"># There are three</text:span></text:p>
      <text:p text:style-name="P2">mini=/home/tore/Album-1/nytt_album/_mini_fladdermus.png; <text:span text:style-name="T7"># </text:span><text:span text:style-name="T2">images to move</text:span></text:p>
      <text:p text:style-name="P1">show=/home/tore/Album-1/nytt_album/_show_fladdermus.png; <text:span text:style-name="T7"># (original + 2)</text:span></text:p>
      <text:p text:style-name="P1">orgmove=$move;</text:p>
      <text:p text:style-name="P1">orgmini=$mini;</text:p>
      <text:p text:style-name="P1">orgshow=$show;</text:p>
      <text:p text:style-name="P1">moveto=/home/tore/Album-1/nytt_album/Exempel/;</text:p>
      <text:p text:style-name="P1"/>
      <text:p text:style-name="P1">lpp=../../; <text:s text:c="18"/><text:span text:style-name="T8"># Only used if it is a link to be moved</text:span></text:p>
      <text:p text:style-name="P1">lnksave=$(readlink -n $move); <text:span text:style-name="T1"># Are we going to move a link?</text:span></text:p>
      <text:p text:style-name="P1">if [ $lnksave ];then <text:s text:c="9"/><text:span text:style-name="T1"># If a link, modify all three</text:span></text:p>
      <text:p text:style-name="P1"><text:s text:c="2"/>move=$(echo $move|sed -e "s/\(.*$picfound.*\)\.[^.\/]\+\(\.[^.\/]\+$\)/\1\2/");</text:p>
      <text:p text:style-name="P1"><text:s text:c="2"/>mini=$(echo $mini|sed -e "s/\(.*$picfound.*\)\.[^.\/]\+\(\.[^.\/]\+$\)/\1\2/");</text:p>
      <text:p text:style-name="P1"><text:s text:c="2"/>show=$(echo $show|sed -e "s/\(.*$picfound.*\)\.[^.\/]\+\(\.[^.\/]\+$\)/\1\2/");</text:p>
      <text:p text:style-name="P1"><text:s text:c="2"/>lnkfrom=$(echo $lnksave|sed -e "s/^\(\.\{1,2\}\/\)*//" -e "s,^,$lpp,");</text:p>
      <text:p text:style-name="P1"><text:s text:c="2"/>lnkmini=$(echo $lnkfrom|sed -e "s/\([^/]\+\)\(\.[^/.]\+\)\$/_mini_\1\.png/");</text:p>
      <text:p text:style-name="P1"><text:s text:c="2"/>lnkshow=$(echo $lnkfrom|sed -e "s/\([^/]\+\)\(\.[^/.]\+\)\$/_show_\1\.png/");</text:p>
      <text:p text:style-name="P1"><text:s text:c="2"/>ln -sfn $lnkfrom $move;</text:p>
      <text:p text:style-name="P1">fi;</text:p>
      <text:p text:style-name="P1"/>
      <text:p text:style-name="P1">mv -n $move $moveto; <text:s text:c="11"/><text:span text:style-name="T2"># Make the move</text:span></text:p>
      <text:p text:style-name="P1">if [ $? -ne 0 ];then <text:s text:c="11"/><text:span text:style-name="T9"># If return error code</text:span></text:p>
      <text:p text:style-name="P1"><text:s text:c="2"/>if [ $move != $orgmove ];then <text:span text:style-name="T7"># Remove if necessary? </text:span><text:span text:style-name="T9">Unclear</text:span></text:p>
      <text:p text:style-name="P1"><text:s text:c="4"/>rm $move;</text:p>
      <text:p text:style-name="P1"><text:s text:c="2"/>fi;</text:p>
      <text:p text:style-name="P1"><text:s text:c="2"/>exit;</text:p>
      <text:p text:style-name="P1">else</text:p>
      <text:p text:style-name="P1"><text:s text:c="2"/>if [ $lnksave ];then <text:s text:c="9"/><text:span text:style-name="T7"># If a link, set links</text:span></text:p>
      <text:p text:style-name="P1"><text:s text:c="4"/>ln -sfn $lnkmini $mini;</text:p>
      <text:p text:style-name="P1"><text:s text:c="4"/>ln -sfn $lnkshow $show;</text:p>
      <text:p text:style-name="P1"><text:s text:c="2"/>fi;</text:p>
      <text:p text:style-name="P1"><text:s text:c="2"/>mv -n $mini $show $moveto; <text:s text:c="3"/><text:span text:style-name="T7"># and move them?</text:span></text:p>
      <text:p text:style-name="P1"/>
      <text:p text:style-name="P2"><text:s text:c="2"/>if [ $move != $orgmove ];then <text:span text:style-name="T7"># If changed, remove the original</text:span></text:p>
      <text:p text:style-name="P1"><text:s text:c="4"/>rm $orgmove;</text:p>
      <text:p text:style-name="P1"><text:s text:c="2"/>fi;</text:p>
      <text:p text:style-name="P2"><text:s text:c="2"/>if [ $mini != $orgmini ];then <text:span text:style-name="T7"># If changed, remove the original</text:span></text:p>
      <text:p text:style-name="P1"><text:s text:c="4"/>rm $orgmini;</text:p>
      <text:p text:style-name="P1"><text:s text:c="2"/>fi;</text:p>
      <text:p text:style-name="P2"><text:s text:c="2"/>if [ $show != $orgshow ];then <text:span text:style-name="T7"># If changed, remove the original</text:span></text:p>
      <text:p text:style-name="P1"><text:s text:c="4"/>rm $orgshow;</text:p>
      <text:p text:style-name="P1"><text:s text:c="2"/>fi;</text:p>
      <text:p text:style-name="P1">fi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Georgia" svg:font-family="Georgia" style:font-family-generic="roman"/>
    <style:font-face style:name="Georgia1" svg:font-family="Georgia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14:23:30.123707400</meta:creation-date>
    <dc:date>2026-06-06T23:12:22.821675666</dc:date>
    <meta:editing-duration>PT6H26M41S</meta:editing-duration>
    <meta:editing-cycles>5</meta:editing-cycles>
    <meta:generator>LibreOffice/24.2.7.2$Linux_X86_64 LibreOffice_project/420$Build-2</meta:generator>
    <meta:print-date>2026-05-09T16:40:20.512501243</meta:print-date>
    <meta:document-statistic meta:table-count="0" meta:image-count="0" meta:object-count="0" meta:page-count="1" meta:paragraph-count="43" meta:word-count="230" meta:character-count="1952" meta:non-whitespace-character-count="1633"/>
  </office:meta>
</office:document-meta>
</file>