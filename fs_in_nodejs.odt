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1" style:family="table">
      <style:table-properties style:width="17.149cm" fo:margin-left="0cm" table:align="left"/>
    </style:style>
    <style:style style:name="Tabell1.A" style:family="table-column">
      <style:table-column-properties style:column-width="11.451cm"/>
    </style:style>
    <style:style style:name="Tabell1.B" style:family="table-column">
      <style:table-column-properties style:column-width="5.697cm"/>
    </style:style>
    <style:style style:name="Tabell1.A1" style:family="table-cell">
      <style:table-cell-properties style:vertical-align="middle" fo:padding="0.049cm" fo:border="none"/>
    </style:style>
    <style:style style:name="Tabell2" style:family="table">
      <style:table-properties style:width="15.841cm" table:align="left"/>
    </style:style>
    <style:style style:name="Tabell2.A" style:family="table-column">
      <style:table-column-properties style:column-width="7.049cm"/>
    </style:style>
    <style:style style:name="Tabell2.B" style:family="table-column">
      <style:table-column-properties style:column-width="8.793cm"/>
    </style:style>
    <style:style style:name="Tabell2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-2cm" fo:text-indent="0cm" style:auto-text-indent="false"/>
    </style:style>
    <style:style style:name="P7" style:family="paragraph" style:parent-style-name="Standard">
      <style:paragraph-properties fo:margin-top="0cm" fo:margin-bottom="0.499cm" style:contextual-spacing="false" fo:text-align="end" style:justify-single-word="false"/>
      <style:text-properties fo:font-style="italic" officeooo:paragraph-rsid="00174ad3" style:font-style-asian="italic" style:font-style-complex="italic"/>
    </style:style>
    <style:style style:name="P8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1994b5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ext_20_body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.499cm" style:contextual-spacing="false" fo:text-align="start" style:justify-single-word="false"/>
      <style:text-properties style:font-name="Liberation Mono" fo:font-size="10pt" fo:font-style="italic" officeooo:rsid="00174ad3" officeooo:paragraph-rsid="00174ad3" fo:background-color="#ffffff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fo:font-style="normal" officeooo:rsid="00174ad3" style:font-style-asian="normal" style:font-style-complex="normal"/>
    </style:style>
    <style:style style:name="T2" style:family="text">
      <style:text-properties fo:font-style="normal" officeooo:rsid="001994b5" style:font-style-asian="normal" style:font-style-complex="normal"/>
    </style:style>
    <style:style style:name="T3" style:family="text">
      <style:text-properties fo:font-style="normal" fo:font-weight="bold" officeooo:rsid="001994b5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74ad3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9d160" style:font-style-asian="normal" style:font-weight-asian="bold" style:font-style-complex="normal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174ad3" style:font-size-asian="10pt" style:font-style-asian="normal" style:font-size-complex="10pt" style:font-style-complex="normal"/>
    </style:style>
    <style:style style:name="T9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size="10pt" fo:font-style="normal" fo:font-weight="bold" officeooo:rsid="00174ad3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tyle="italic" officeooo:rsid="00174ad3" style:font-style-asian="italic" style:font-style-complex="italic"/>
    </style:style>
    <style:style style:name="T12" style:family="text">
      <style:text-properties fo:font-style="italic" officeooo:rsid="001994b5" style:font-style-asian="italic" style:font-style-complex="italic"/>
    </style:style>
    <style:style style:name="T13" style:family="text">
      <style:text-properties fo:color="#000000" loext:opacity="100%" style:font-name="Liberation Mono" fo:font-size="10pt" fo:font-weight="normal" fo:background-color="#ffffff" loext:char-shading-value="0" style:font-size-asian="10pt" style:font-size-complex="10pt"/>
    </style:style>
    <style:style style:name="T14" style:family="text">
      <style:text-properties fo:color="#000000" loext:opacity="100%" style:font-name="Liberation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15" style:family="text">
      <style:text-properties fo:color="#000000" loext:opacity="100%" style:font-name="Georgia1" fo:font-size="12pt" fo:font-style="italic" fo:font-weight="normal" officeooo:rsid="0017cf7a" fo:background-color="#ffffff" loext:char-shading-value="0" style:font-size-asian="12pt" style:font-style-asian="italic" style:font-size-complex="12pt" style:font-style-complex="italic"/>
    </style:style>
    <style:style style:name="T16" style:family="text">
      <style:text-properties fo:color="#000000" loext:opacity="100%" style:font-name="Georgia1" fo:font-size="12pt" fo:font-style="italic" fo:font-weight="bold" officeooo:rsid="0017cf7a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Georgia1" fo:font-size="12pt" style:font-size-asian="12pt" style:font-size-complex="12pt"/>
    </style:style>
    <style:style style:name="T18" style:family="text">
      <style:text-properties style:font-name="Georgia1"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9fb33"/>
    </style:style>
    <style:style style:name="T22" style:family="text">
      <style:text-properties officeooo:rsid="001aa31b"/>
    </style:style>
    <style:style style:name="T23" style:family="text">
      <style:text-properties fo:font-size="11pt" style:font-size-asian="11pt" style:font-size-complex="11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2026-07-21: <text:s/></text:span><text:span text:style-name="T4">About w</text:span><text:span text:style-name="T3">h</text:span><text:span text:style-name="T4">ether to use, </text:span><text:span text:style-name="T3">in Node JS </text:span><text:span text:style-name="T5">v.&gt;20</text:span><text:span text:style-name="T11"><text:line-break/><text:line-break/></text:span><text:span text:style-name="T14">import { access, constants, writeFile, readFile, readdir, open } from <text:tab/><text:tab/><text:tab/><text:tab/><text:tab/><text:tab/><text:tab/><text:tab/><text:tab/><text:tab/> <text:s text:c="6"/>'node:fs/promises'</text:span><text:span text:style-name="T13"><text:line-break/></text:span><text:span text:style-name="T16">or <text:s text:c="2"/></text:span><text:span text:style-name="T14">import fs from 'node:fs'</text:span></text:p>
      <text:p text:style-name="P13"><text:span text:style-name="T18">It looks a bit redundant at first, but it is actually importing </text:span><text:span text:style-name="Strong_20_Emphasis"><text:span text:style-name="T18">two different APIs</text:span></text:span><text:span text:style-name="T18"> from the same module.</text:span></text:p>
      <text:section text:style-name="Sect1" text:name="Område13">
        <text:p text:style-name="P6"><text:bookmark text:name="code-block-viewer kopiera 12"/><text:span text:style-name="Source_20_Text">import { access, constants, writeFile, readFile, readdir, open }</text:span></text:p>
        <text:p text:style-name="Preformatted_20_Text"><text:span text:style-name="Source_20_Text"><text:s text:c="2"/>from 'node:fs/promises'</text:span></text:p>
        <text:p text:style-name="Preformatted_20_Text"/>
        <text:p text:style-name="P3"><text:span text:style-name="Source_20_Text">import fs from 'node:fs'</text:span></text:p>
      </text:section>
      <text:h text:style-name="Heading_20_3" text:outline-level="3">1. <text:span text:style-name="Source_20_Text">node:fs/promises</text:span></text:h>
      <text:p text:style-name="Text_20_body">This is the <text:span text:style-name="Strong_20_Emphasis">Promise-based</text:span> filesystem API.</text:p>
      <text:p text:style-name="Text_20_body">The imported functions all return Promises, so they are intended to be used with <text:span text:style-name="Source_20_Text">await</text:span>.</text:p>
      <text:section text:style-name="Sect1" text:name="Område14">
        <text:p text:style-name="P5"><text:bookmark text:name="code-block-viewer kopiera 13"/><text:span text:style-name="Source_20_Text">const text = await readFile("file.txt", "utf8");</text:span></text:p>
        <text:p text:style-name="Preformatted_20_Text"/>
        <text:p text:style-name="Preformatted_20_Text"><text:span text:style-name="Source_20_Text">await writeFile("copy.txt", text);</text:span></text:p>
        <text:p text:style-name="Preformatted_20_Text"/>
        <text:p text:style-name="P3"><text:span text:style-name="Source_20_Text">const dir = await readdir(".");</text:span></text:p>
      </text:section>
      <text:p text:style-name="Text_20_body">Without <text:span text:style-name="Source_20_Text"><text:span text:style-name="T23">await</text:span></text:span>, they return a Promise:</text:p>
      <text:section text:style-name="Sect1" text:name="Område15">
        <text:p text:style-name="P4"><text:bookmark text:name="code-block-viewer kopiera 14"/><text:span text:style-name="Source_20_Text">const p = readFile("file.txt"); <text:s text:c="2"/>// Promise&lt;Buffer&gt;</text:span></text:p>
      </text:section>
      <text:p text:style-name="Horizontal_20_Line"/>
      <text:h text:style-name="Heading_20_3" text:outline-level="3">2. <text:span text:style-name="Source_20_Text">node:fs</text:span></text:h>
      <text:p text:style-name="Text_20_body">This is the traditional filesystem module. It contains</text:p>
      <text:list text:style-name="L1">
        <text:list-item>
          <text:p text:style-name="P12">callback-based functions </text:p>
        </text:list-item>
        <text:list-item>
          <text:p text:style-name="P12">synchronous functions </text:p>
        </text:list-item>
        <text:list-item>
          <text:p text:style-name="P12">streams </text:p>
        </text:list-item>
        <text:list-item>
          <text:p text:style-name="P12">classes </text:p>
        </text:list-item>
        <text:list-item>
          <text:p text:style-name="P11">constants </text:p>
        </text:list-item>
      </text:list>
      <text:p text:style-name="Text_20_body">For example</text:p>
      <text:section text:style-name="Sect1" text:name="Område16">
        <text:p text:style-name="P5"><text:bookmark text:name="code-block-viewer kopiera 15"/><text:span text:style-name="Source_20_Text">fs.readFile("file.txt", (err, data) =&gt; { <text:s text:c="3"/>...<text:tab/> <text:s text:c="3"/></text:span><text:span text:style-name="Source_20_Text"><text:span text:style-name="T21">}</text:span></text:span><text:span text:style-name="Source_20_Text">);</text:span></text:p>
        <text:p text:style-name="Preformatted_20_Text"/>
        <text:p text:style-name="P3"><text:span text:style-name="Source_20_Text">const data = fs.readFileSync("file.txt");</text:span></text:p>
      </text:section>
      <text:p text:style-name="Text_20_body">or</text:p>
      <text:section text:style-name="Sect1" text:name="Område17">
        <text:p text:style-name="P4"><text:bookmark text:name="code-block-viewer kopiera 16"/><text:span text:style-name="Source_20_Text">const stream = fs.createReadStream("bigfile.dat");</text:span></text:p>
      </text:section>
      <text:p text:style-name="Text_20_body">Notice that <text:span text:style-name="Source_20_Text"><text:span text:style-name="T23">createReadStream()</text:span></text:span> does <text:span text:style-name="Strong_20_Emphasis">not</text:span> exist in <text:span text:style-name="Source_20_Text"><text:span text:style-name="T23">fs/promises</text:span></text:span>.<text:line-break/></text:p>
      <text:p text:style-name="P7"><text:soft-page-break/><text:span text:style-name="T20">If I use</text:span><text:span text:style-name="Source_20_Text"><text:span text:style-name="T9"> </text:span></text:span><text:span text:style-name="Source_20_Text"><text:span text:style-name="T10">i</text:span></text:span><text:span text:style-name="Source_20_Text"><text:span text:style-name="T9">mport fs from 'node:fs/promises'</text:span></text:span><text:span text:style-name="T20">, what does it mean?</text:span></text:p>
      <text:p text:style-name="Text_20_body">Good question! That is actually a different kind of import.</text:p>
      <text:p text:style-name="Text_20_body">When you write</text:p>
      <text:section text:style-name="Sect1" text:name="code-block-viewer">
        <text:p text:style-name="P4"><text:span text:style-name="Source_20_Text">import fs from 'node:fs/promises';</text:span></text:p>
      </text:section>
      <text:p text:style-name="Text_20_body">you are importing the <text:span text:style-name="Strong_20_Emphasis">entire exported object</text:span> from <text:span text:style-name="Source_20_Text"><text:span text:style-name="T23">node:fs/promises</text:span></text:span> and giving it the local name <text:span text:style-name="Source_20_Text">fs</text:span>.</text:p>
      <text:p text:style-name="Text_20_body">So instead of</text:p>
      <text:section text:style-name="Sect1" text:name="Område1">
        <text:p text:style-name="P5"><text:bookmark text:name="code-block-viewer"/><text:span text:style-name="Source_20_Text">import { readFile, writeFile } from 'node:fs/promises';</text:span></text:p>
        <text:p text:style-name="Preformatted_20_Text"/>
        <text:p text:style-name="Preformatted_20_Text"><text:span text:style-name="Source_20_Text">const text = await readFile("a.txt", "utf8");</text:span></text:p>
        <text:p text:style-name="P3"><text:span text:style-name="Source_20_Text">await writeFile("b.txt", text);</text:span></text:p>
      </text:section>
      <text:p text:style-name="Text_20_body">you would write</text:p>
      <text:section text:style-name="Sect1" text:name="Område2">
        <text:p text:style-name="P5"><text:bookmark text:name="code-block-viewer kopiera 1"/><text:span text:style-name="Source_20_Text">import fs from 'node:fs/promises';</text:span></text:p>
        <text:p text:style-name="Preformatted_20_Text"/>
        <text:p text:style-name="Preformatted_20_Text"><text:span text:style-name="Source_20_Text">const text = await fs.readFile("a.txt", "utf8");</text:span></text:p>
        <text:p text:style-name="P3"><text:span text:style-name="Source_20_Text">await fs.writeFile("b.txt", text);</text:span></text:p>
      </text:section>
      <text:p text:style-name="Text_20_body">The two styles are equivalent in what they can do:</text:p>
      <table:table table:name="Tabell1" table:style-name="Tabell1">
        <table:table-column table:style-name="Tabell1.A"/>
        <table:table-column table:style-name="Tabell1.B"/>
        <table:table-header-rows>
          <table:table-row>
            <table:table-cell table:style-name="Tabell1.A1" office:value-type="string">
              <text:p text:style-name="P9">Import style</text:p>
            </table:table-cell>
            <table:table-cell table:style-name="Tabell1.A1" office:value-type="string">
              <text:p text:style-name="P9">Usage</text:p>
            </table:table-cell>
          </table:table-row>
        </table:table-header-rows>
        <table:table-row>
          <table:table-cell table:style-name="Tabell1.A1" office:value-type="string">
            <text:p text:style-name="Table_20_Contents"><text:span text:style-name="Source_20_Text">import { readFile } from 'node:fs/promises'</text:span></text:p>
          </table:table-cell>
          <table:table-cell table:style-name="Tabell1.A1" office:value-type="string">
            <text:p text:style-name="Table_20_Contents"><text:span text:style-name="Source_20_Text">await readFile(...)</text:span></text:p>
          </table:table-cell>
        </table:table-row>
        <table:table-row>
          <table:table-cell table:style-name="Tabell1.A1" office:value-type="string">
            <text:p text:style-name="Table_20_Contents"><text:span text:style-name="Source_20_Text">import fs from 'node:fs/promises'</text:span></text:p>
          </table:table-cell>
          <table:table-cell table:style-name="Tabell1.A1" office:value-type="string">
            <text:p text:style-name="Table_20_Contents"><text:span text:style-name="Source_20_Text">await fs.readFile(...)</text:span></text:p>
          </table:table-cell>
        </table:table-row>
      </table:table>
      <text:h text:style-name="Heading_20_3" text:outline-level="3">What does <text:span text:style-name="Source_20_Text">fs</text:span> contain?</text:h>
      <text:p text:style-name="Text_20_body">It is an object whose properties are all the Promise-based filesystem functions:</text:p>
      <text:section text:style-name="Sect1" text:name="Område3">
        <text:p text:style-name="P5"><text:bookmark text:name="code-block-viewer kopiera 2"/><text:span text:style-name="Source_20_Text">import fs from 'node:fs/promises';</text:span></text:p>
        <text:p text:style-name="Preformatted_20_Text"/>
        <text:p text:style-name="Preformatted_20_Text"><text:span text:style-name="Source_20_Text">await fs.access(...);</text:span></text:p>
        <text:p text:style-name="Preformatted_20_Text"><text:span text:style-name="Source_20_Text">await fs.readFile(...);</text:span></text:p>
        <text:p text:style-name="Preformatted_20_Text"><text:span text:style-name="Source_20_Text">await fs.writeFile(...);</text:span></text:p>
        <text:p text:style-name="Preformatted_20_Text"><text:span text:style-name="Source_20_Text">await fs.readdir(...);</text:span></text:p>
        <text:p text:style-name="Preformatted_20_Text"><text:span text:style-name="Source_20_Text">const file = await fs.open(...);</text:span></text:p>
        <text:p text:style-name="Preformatted_20_Text"><text:span text:style-name="Source_20_Text">await fs.mkdir(...);</text:span></text:p>
        <text:p text:style-name="P3"><text:span text:style-name="Source_20_Text">await fs.rename(...);</text:span></text:p>
      </text:section>
      <text:p text:style-name="Text_20_body">It <text:span text:style-name="Strong_20_Emphasis">does not</text:span> contain the callback-based functions or stream-related methods such as</text:p>
      <text:section text:style-name="Sect1" text:name="Område4">
        <text:p text:style-name="P5"><text:bookmark text:name="code-block-viewer kopiera 3"/><text:span text:style-name="Source_20_Text">fs.createReadStream() <text:s text:c="2"/>// ❌ doesn't exist</text:span></text:p>
        <text:p text:style-name="P3"><text:span text:style-name="Source_20_Text">fs.readFileSync() <text:s text:c="6"/>// ❌ doesn't exist</text:span></text:p>
      </text:section>
      <text:p text:style-name="Text_20_body">Those belong to <text:span text:style-name="Source_20_Text">node:fs</text:span>, not <text:span text:style-name="Source_20_Text">node:fs/promises</text:span>.</text:p>
      <text:h text:style-name="Heading_20_3" text:outline-level="3">Which style is preferable?</text:h>
      <text:p text:style-name="Text_20_body">Many developers choose based on how many functions they need.</text:p>
      <text:p text:style-name="Text_20_body"/>
      <text:p text:style-name="P14">If you use only a few:</text:p>
      <text:section text:style-name="Sect1" text:name="Område5">
        <text:p text:style-name="P4"><text:bookmark text:name="code-block-viewer kopiera 4"/><text:span text:style-name="Source_20_Text">import { readFile, writeFile } from 'node:fs/promises';</text:span></text:p>
      </text:section>
      <text:p text:style-name="Text_20_body">is concise and avoids repeatedly writing <text:span text:style-name="Source_20_Text">fs.</text:span>.</text:p>
      <text:p text:style-name="Text_20_body">If you use many Promise-based methods, this can be more readable:</text:p>
      <text:section text:style-name="Sect1" text:name="Område6">
        <text:p text:style-name="P5"><text:bookmark text:name="code-block-viewer kopiera 5"/><text:span text:style-name="Source_20_Text">import fs from 'node:fs/promises';</text:span></text:p>
        <text:p text:style-name="Preformatted_20_Text"/>
        <text:p text:style-name="Preformatted_20_Text"><text:span text:style-name="Source_20_Text">const files = await fs.readdir(dir);</text:span></text:p>
        <text:p text:style-name="Preformatted_20_Text"><text:span text:style-name="Source_20_Text">const text <text:s/>= await fs.readFile(file, "utf8");</text:span></text:p>
        <text:p text:style-name="P3"><text:span text:style-name="Source_20_Text">await fs.writeFile(out, text);</text:span></text:p>
      </text:section>
      <text:p text:style-name="Text_20_body">The <text:span text:style-name="Source_20_Text">fs.</text:span> prefix also makes it immediately obvious that these are filesystem operations. Both styles are common and equally valid in modern Node.js.<text:line-break/></text:p>
      <text:p text:style-name="P10">How about fs.close()?</text:p>
      <text:p text:style-name="Text_20_body">This is where <text:span text:style-name="Source_20_Text"><text:span text:style-name="T23">fs/promises</text:span></text:span> becomes a little subtle.</text:p>
      <text:p text:style-name="Text_20_body">There is <text:span text:style-name="Strong_20_Emphasis">no</text:span> top-level</text:p>
      <text:section text:style-name="Sect1" text:name="Område7">
        <text:p text:style-name="P4"><text:bookmark text:name="code-block-viewer kopiera 6"/><text:span text:style-name="Source_20_Text">await fs.close(...)</text:span></text:p>
      </text:section>
      <text:p text:style-name="Text_20_body">in <text:span text:style-name="Source_20_Text">node:</text:span><text:span text:style-name="Source_20_Text"><text:span text:style-name="T23">fs/promises</text:span></text:span>.</text:p>
      <text:p text:style-name="Text_20_body">Instead, <text:span text:style-name="Source_20_Text">open()</text:span> returns a <text:span text:style-name="Strong_20_Emphasis">FileHandle</text:span>, and <text:span text:style-name="Strong_20_Emphasis">that object</text:span> has a <text:span text:style-name="Source_20_Text">close()</text:span> method.</text:p>
      <text:p text:style-name="Text_20_body">Example:</text:p>
      <text:section text:style-name="Sect1" text:name="Område8">
        <text:p text:style-name="P5"><text:bookmark text:name="code-block-viewer kopiera 7"/><text:span text:style-name="Source_20_Text">import fs from 'node:fs/promises';</text:span></text:p>
        <text:p text:style-name="Preformatted_20_Text"/>
        <text:p text:style-name="Preformatted_20_Text"><text:span text:style-name="Source_20_Text">const file = await fs.open("test.txt", "r");</text:span></text:p>
        <text:p text:style-name="Preformatted_20_Text"/>
        <text:p text:style-name="Preformatted_20_Text"><text:span text:style-name="Source_20_Text">try {</text:span></text:p>
        <text:p text:style-name="Preformatted_20_Text"><text:span text:style-name="Source_20_Text"><text:s text:c="4"/>const data = await file.readFile({ encoding: "utf8" });</text:span></text:p>
        <text:p text:style-name="Preformatted_20_Text"><text:span text:style-name="Source_20_Text"><text:s text:c="4"/>console.log(data);</text:span></text:p>
        <text:p text:style-name="Preformatted_20_Text"><text:span text:style-name="Source_20_Text">} finally {</text:span></text:p>
        <text:p text:style-name="Preformatted_20_Text"><text:span text:style-name="Source_20_Text"><text:s text:c="4"/>await file.close();</text:span></text:p>
        <text:p text:style-name="P3"><text:span text:style-name="Source_20_Text">}</text:span></text:p>
      </text:section>
      <text:p text:style-name="Text_20_body">or, if you've imported <text:span text:style-name="Source_20_Text"><text:span text:style-name="T23">open</text:span></text:span> directly:</text:p>
      <text:section text:style-name="Sect1" text:name="Område9">
        <text:p text:style-name="P5"><text:bookmark text:name="code-block-viewer kopiera 8"/><text:span text:style-name="Source_20_Text">import { open } from 'node:fs/promises';</text:span></text:p>
        <text:p text:style-name="Preformatted_20_Text"/>
        <text:p text:style-name="Preformatted_20_Text"><text:span text:style-name="Source_20_Text">const file = await open("test.txt", "r");</text:span></text:p>
        <text:p text:style-name="P3"><text:span text:style-name="Source_20_Text">await file.close();</text:span></text:p>
      </text:section>
      <text:h text:style-name="Heading_20_3" text:outline-level="3"/>
      <text:h text:style-name="P2" text:outline-level="3">Why?</text:h>
      <text:p text:style-name="Text_20_body">The old callback API worked with <text:span text:style-name="Strong_20_Emphasis">file descriptors</text:span> (integers):</text:p>
      <text:section text:style-name="Sect1" text:name="Område10">
        <text:p text:style-name="P5"><text:bookmark text:name="code-block-viewer kopiera 9"/><text:span text:style-name="Source_20_Text">import fs from 'node:fs';</text:span></text:p>
        <text:p text:style-name="Preformatted_20_Text"/>
        <text:p text:style-name="Preformatted_20_Text"><text:span text:style-name="Source_20_Text">fs.open("test.txt", "r", (err, fd) =&gt; {</text:span></text:p>
        <text:p text:style-name="Preformatted_20_Text"><text:span text:style-name="Source_20_Text"><text:s text:c="4"/>// fd is a number</text:span></text:p>
        <text:p text:style-name="Preformatted_20_Text"><text:span text:style-name="Source_20_Text"><text:s text:c="4"/>fs.close(fd, err =&gt; { ... });</text:span></text:p>
        <text:p text:style-name="P3"><text:span text:style-name="Source_20_Text">});</text:span></text:p>
      </text:section>
      <text:p text:style-name="Text_20_body">In the Promise API, <text:span text:style-name="Source_20_Text">open()</text:span> returns a richer object:</text:p>
      <text:section text:style-name="Sect1" text:name="Område11">
        <text:p text:style-name="P4"><text:bookmark text:name="code-block-viewer kopiera 10"/><text:span text:style-name="Source_20_Text">const file = await fs.open(...);</text:span></text:p>
      </text:section>
      <text:p text:style-name="Text_20_body">where <text:span text:style-name="Source_20_Text">file</text:span> is a <text:span text:style-name="Strong_20_Emphasis">FileHandle</text:span>. That object knows which file it represents and provides methods such as:</text:p>
      <text:section text:style-name="Sect1" text:name="Område12">
        <text:p text:style-name="P5"><text:bookmark text:name="code-block-viewer kopiera 11"/><text:span text:style-name="Source_20_Text">await file.read(...);</text:span></text:p>
        <text:p text:style-name="Preformatted_20_Text"><text:span text:style-name="Source_20_Text">await file.write(...);</text:span></text:p>
        <text:p text:style-name="Preformatted_20_Text"><text:span text:style-name="Source_20_Text">await file.readFile();</text:span></text:p>
        <text:p text:style-name="Preformatted_20_Text"><text:span text:style-name="Source_20_Text">await file.writeFile();</text:span></text:p>
        <text:p text:style-name="Preformatted_20_Text"><text:span text:style-name="Source_20_Text">await file.stat();</text:span></text:p>
        <text:p text:style-name="Preformatted_20_Text"><text:span text:style-name="Source_20_Text">await file.sync();</text:span></text:p>
        <text:p text:style-name="Preformatted_20_Text"><text:span text:style-name="Source_20_Text">await file.datasync();</text:span></text:p>
        <text:p text:style-name="Preformatted_20_Text"><text:span text:style-name="Source_20_Text">await file.truncate();</text:span></text:p>
        <text:p text:style-name="P3"><text:span text:style-name="Source_20_Text">await file.close();</text:span></text:p>
      </text:section>
      <text:p text:style-name="Text_20_body">So the two APIs compare like this:</text:p>
      <table:table table:name="Tabell2" table:style-name="Tabell2">
        <table:table-column table:style-name="Tabell2.A"/>
        <table:table-column table:style-name="Tabell2.B"/>
        <table:table-header-rows>
          <table:table-row>
            <table:table-cell table:style-name="Tabell2.A1" office:value-type="string">
              <text:p text:style-name="P9">Callback API (<text:span text:style-name="Source_20_Text">node:fs</text:span>)</text:p>
            </table:table-cell>
            <table:table-cell table:style-name="Tabell2.A1" office:value-type="string">
              <text:p text:style-name="P9">Promise API (<text:span text:style-name="Source_20_Text">node:fs/promises</text:span>)</text:p>
            </table:table-cell>
          </table:table-row>
        </table:table-header-rows>
        <table:table-row>
          <table:table-cell table:style-name="Tabell2.A1" office:value-type="string">
            <text:p text:style-name="Table_20_Contents"><text:span text:style-name="Source_20_Text">fs.open()</text:span> → file descriptor (<text:span text:style-name="Source_20_Text">fd</text:span>)</text:p>
          </table:table-cell>
          <table:table-cell table:style-name="Tabell2.A1" office:value-type="string">
            <text:p text:style-name="Table_20_Contents"><text:span text:style-name="Source_20_Text">fs.open()</text:span> → <text:span text:style-name="Source_20_Text">FileHandle</text:span></text:p>
          </table:table-cell>
        </table:table-row>
        <table:table-row>
          <table:table-cell table:style-name="Tabell2.A1" office:value-type="string">
            <text:p text:style-name="Table_20_Contents"><text:span text:style-name="Source_20_Text">fs.close(fd)</text:span></text:p>
          </table:table-cell>
          <table:table-cell table:style-name="Tabell2.A1" office:value-type="string">
            <text:p text:style-name="Table_20_Contents"><text:span text:style-name="Source_20_Text">fileHandle.close()</text:span></text:p>
          </table:table-cell>
        </table:table-row>
        <table:table-row>
          <table:table-cell table:style-name="Tabell2.A1" office:value-type="string">
            <text:p text:style-name="Table_20_Contents"><text:span text:style-name="Source_20_Text">fs.read(fd, ...)</text:span></text:p>
          </table:table-cell>
          <table:table-cell table:style-name="Tabell2.A1" office:value-type="string">
            <text:p text:style-name="Table_20_Contents"><text:span text:style-name="Source_20_Text">fileHandle.read(...)</text:span></text:p>
          </table:table-cell>
        </table:table-row>
        <table:table-row>
          <table:table-cell table:style-name="Tabell2.A1" office:value-type="string">
            <text:p text:style-name="Table_20_Contents"><text:span text:style-name="Source_20_Text">fs.write(fd, ...)</text:span></text:p>
          </table:table-cell>
          <table:table-cell table:style-name="Tabell2.A1" office:value-type="string">
            <text:p text:style-name="Table_20_Contents"><text:span text:style-name="Source_20_Text">fileHandle.write(...)</text:span></text:p>
          </table:table-cell>
        </table:table-row>
      </table:table>
      <text:p text:style-name="Text_20_body">I actually prefer the Promise design—it is more object-oriented. Instead of carrying around an integer file descriptor and remembering to pass it to <text:span text:style-name="Source_20_Text"><text:span text:style-name="T23">fs.close(fd)</text:span></text:span>, the handle itself encapsulates the resource, so <text:s/><text:span text:style-name="Source_20_Text"><text:span text:style-name="T23">await file.close()</text:span></text:span> <text:s/>is both clearer and harder to misus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aa31b"/>
    </style:style>
    <style:page-layout style:name="Mpm1">
      <style:page-layout-properties fo:page-width="21.001cm" fo:page-height="29.7cm" style:num-format="1" style:print-orientation="portrait" fo:margin-top="2.499cm" fo:margin-bottom="1.199cm" fo:margin-left="2.499cm" fo:margin-right="2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opacity="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text:span text:style-name="MT1">(</text:span><text:span text:style-name="MT1"><text:page-count>4</text:page-count></text:span><text:span text:style-name="MT1">)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8:34:54.779790106</meta:creation-date>
    <dc:date>2026-07-21T19:55:52.857014934</dc:date>
    <meta:editing-duration>PT14M56S</meta:editing-duration>
    <meta:editing-cycles>4</meta:editing-cycles>
    <meta:generator>LibreOffice/24.2.7.2$Linux_X86_64 LibreOffice_project/420$Build-2</meta:generator>
    <meta:document-statistic meta:table-count="2" meta:image-count="0" meta:object-count="0" meta:page-count="4" meta:paragraph-count="122" meta:word-count="645" meta:character-count="4545" meta:non-whitespace-character-count="3958"/>
  </office:meta>
</office:document-meta>
</file>