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right="-1cm"/>
      <style:text-properties fo:font-weight="bold" officeooo:rsid="000513aa" officeooo:paragraph-rsid="0005847f" style:font-weight-asian="bold" style:font-weight-complex="bold"/>
    </style:style>
    <style:style style:name="P2" style:family="paragraph" style:parent-style-name="Standard">
      <style:text-properties officeooo:paragraph-rsid="0005847f"/>
    </style:style>
    <style:style style:name="P3" style:family="paragraph" style:parent-style-name="Standard">
      <style:paragraph-properties fo:margin-right="-1cm"/>
      <style:text-properties fo:font-weight="normal" officeooo:rsid="000513aa" officeooo:paragraph-rsid="0008d4a1" style:font-weight-asian="normal" style:font-weight-complex="normal"/>
    </style:style>
    <style:style style:name="T1" style:family="text">
      <style:text-properties officeooo:rsid="000513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847f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file-name text:display="full">/home/tore/Arbeten/mish/about_calls_in_templates.odt</text:file-name></text:p>
      <text:p text:style-name="P1"/>
      <text:p text:style-name="P1">Exempel på Discord-chatt med NullVoxPopuli på Ember help-forum, <text:span text:style-name="T3">juni</text:span> <text:span text:style-name="T3">2026</text:span></text:p>
      <text:p text:style-name="Standard"/>
      <text:p text:style-name="Standard">...</text:p>
      <text:p text:style-name="Standard">I just removed that first function because you weren't using the return value in any way</text:p>
      <text:p text:style-name="Standard"/>
      <text:p text:style-name="Standard"><text:span text:style-name="T2">toreric</text:span>TS</text:p>
      <text:p text:style-name="Standard"><text:s/>— </text:p>
      <text:p text:style-name="Standard"><text:span text:style-name="T3">2026-06-08 </text:span>01:11</text:p>
      <text:p text:style-name="Standard">Thank you for opening my eyes! </text:p>
      <text:p text:style-name="Standard">I have reviewed through my use of getPromiseState and made this note in my last commit, referring to calling async functions from templates:</text:p>
      <text:p text:style-name="Standard"/>
      <text:p text:style-name="Standard">This was a review of the getPromiseState use. Do not use only for the reason of running an async function. However, it MUST be used when such a function is really returning a value; getPromiseState should else be avoided, with a distinct exception: When the template call is made like 'mocking plain text' it must be used, even if it returns nothing, in order to avoid the textified printout of the 'promise object'.</text:p>
      <text:p text:style-name="Standard"/>
      <text:p text:style-name="Standard">Agree?</text:p>
      <text:p text:style-name="Standard"/>
      <text:p text:style-name="Standard"><text:span text:style-name="T2">NullVoxPopuli</text:span>Rollikon, mods</text:p>
      <text:p text:style-name="Standard"><text:s/>— </text:p>
      <text:p text:style-name="P2"><text:span text:style-name="T3">2026-06-08 </text:span>04:41</text:p>
      <text:p text:style-name="Standard"><text:span text:style-name="T5">not in those words, no</text:span> </text:p>
      <text:p text:style-name="Standard">because I differentiate between calling and reading values specifically</text:p>
      <text:p text:style-name="Standard">"calling from the template" is kind of too generic a phrase</text:p>
      <text:p text:style-name="Standard">your async function call is from a user-initiated action</text:p>
      <text:p text:style-name="Standard">and generally in ember, we call functions called via user interaction, an "action"</text:p>
      <text:p text:style-name="Standard">data read for display in a template is everything else, can include evaluating getters, as well as functions, for example:</text:p>
      <text:p text:style-name="Standard"/>
      <text:p text:style-name="Preformatted_20_Text">{{this.idk}} &lt;- could be a getter or function</text:p>
      <text:p text:style-name="Preformatted_20_Text"/>
      <text:p text:style-name="Preformatted_20_Text">{{ (this.foo) }} &lt;- must be a function</text:p>
      <text:p text:style-name="Preformatted_20_Text"/>
      <text:p text:style-name="Preformatted_20_Text">{{ (this.foo this.bar)}}</text:p>
      <text:p text:style-name="Preformatted_20_Text">{{! | <text:s text:c="7"/>^ any value -- we don't know yet, but it's passed to foo }}</text:p>
      <text:p text:style-name="Preformatted_20_Text">{{! ^ must be a function <text:s text:c="45"/>}}</text:p>
      <text:p text:style-name="Preformatted_20_Text"/>
      <text:p text:style-name="Standard">all of these must be synchronous, which is whe<text:span text:style-name="T1">r</text:span>e getPromiseState comes in. getPromiseState turns your async function in to a bucket of synchronous state, provided the return value is used 😉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5T10:15:13.724463509</meta:creation-date>
    <dc:date>2026-06-05T10:45:19.619936760</dc:date>
    <meta:editing-duration>PT19M45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6" meta:word-count="278" meta:character-count="1736" meta:non-whitespace-character-count="1424"/>
  </office:meta>
</office:document-meta>
</file>