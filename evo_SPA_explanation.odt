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eorgia" svg:font-family="Georgia" style:font-family-generic="roman"/>
    <style:font-face style:name="Georgia1" svg:font-family="Georgia"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text-properties style:font-name="Georgia1"/>
    </style:style>
    <style:style style:name="P2" style:family="paragraph" style:parent-style-name="Preformatted_20_Text">
      <style:text-properties style:font-name="Georgia1" officeooo:paragraph-rsid="001f3a9f"/>
    </style:style>
    <style:style style:name="P3" style:family="paragraph" style:parent-style-name="Preformatted_20_Text">
      <style:text-properties style:font-name="Georgia1" officeooo:paragraph-rsid="00212237"/>
    </style:style>
    <style:style style:name="P4" style:family="paragraph" style:parent-style-name="Preformatted_20_Text">
      <style:text-properties style:font-name="Georgia1" officeooo:rsid="00228928" officeooo:paragraph-rsid="00228928"/>
    </style:style>
    <style:style style:name="P5" style:family="paragraph" style:parent-style-name="Preformatted_20_Text">
      <style:text-properties style:font-name="Georgia1" fo:font-weight="normal" officeooo:rsid="00228928" officeooo:paragraph-rsid="00228928" style:font-weight-asian="normal" style:font-weight-complex="normal"/>
    </style:style>
    <style:style style:name="T1" style:family="text">
      <style:text-properties officeooo:rsid="001f3a9f"/>
    </style:style>
    <style:style style:name="T2" style:family="text">
      <style:text-properties fo:font-weight="bold" style:font-weight-asian="bold" style:font-weight-complex="bold"/>
    </style:style>
    <style:style style:name="T3" style:family="text">
      <style:text-properties fo:font-weight="bold" officeooo:rsid="001f3a9f" style:font-weight-asian="bold" style:font-weight-complex="bold"/>
    </style:style>
    <style:style style:name="T4" style:family="text">
      <style:text-properties fo:font-weight="bold" officeooo:rsid="00230a52" style:font-weight-asian="bold" style:font-weight-complex="bold"/>
    </style:style>
    <style:style style:name="T5" style:family="text">
      <style:text-properties fo:font-weight="normal" officeooo:rsid="001f3a9f" style:font-weight-asian="normal" style:font-weight-complex="normal"/>
    </style:style>
    <style:style style:name="T6" style:family="text">
      <style:text-properties officeooo:rsid="0022892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file-name text:display="path">/home/tore/Arbeten/mish/</text:file-name><text:file-name text:display="name-and-extension">evo_SPA_explanation.odt</text:file-name></text:p>
      <text:p text:style-name="P5"/>
      <text:p text:style-name="P4"><text:span text:style-name="T2">Exempel på Discord-c</text:span><text:span text:style-name="T4">h</text:span><text:span text:style-name="T2">att med Ember help-forum</text:span></text:p>
      <text:p text:style-name="P1"><text:span text:style-name="T2"/></text:p>
      <text:p text:style-name="P1"><text:span text:style-name="T2">toreric</text:span>TS</text:p>
      <text:p text:style-name="P2">2026-04-17 19:12</text:p>
      <text:p text:style-name="P1">«fri 2026-04-17, <text:span text:style-name="T2">to</text:span><text:span text:style-name="T3">r</text:span><text:span text:style-name="T2">er</text:span><text:span text:style-name="T3">ic</text:span> posted an advanced solution presented by AI from a detailed question concerning something not functioning in the specifi<text:span text:style-name="T1">c</text:span> Ember/Glimmer/Vite environment:»</text:p>
      <text:p text:style-name="P1">… not yet tried it, what do you think?</text:p>
      <text:p text:style-name="P1"/>
      <text:p text:style-name="P1"/>
      <text:p text:style-name="P1"><text:span text:style-name="T2">evo</text:span>Rollikon, core-cli</text:p>
      <text:p text:style-name="P1">2026-04-17 19:13</text:p>
      <text:p text:style-name="P1">ai completely made that up, sourcemaps are already generated</text:p>
      <text:p text:style-name="P1"/>
      <text:p text:style-name="P1"/>
      <text:p text:style-name="P1"><text:span text:style-name="T2">evo</text:span>Rollikon, core-cli</text:p>
      <text:p text:style-name="P1">2026-04-17 19:22</text:p>
      <text:p text:style-name="P1"><text:span text:style-name="T6">T</text:span>he problem is you're rendering your dialog once so currentStat is called once immediately before you ever show your dialog. <text:span text:style-name="T6">T</text:span>racked things like {{this.z.picIndex}} will re-render but not other parts of your dialog, so currentStat is never going to run again. Those debugger statements will never run when you show the dialog in the way you are now (by running the DOM .show() of a dialog element).</text:p>
      <text:p text:style-name="P1"/>
      <text:p text:style-name="P1">There is so much direct dom access and manipulation in your app. It's antithetical to how a SPA framework expects you to build your app. Direct DOM access and manipulation should be close to or exactly 0. That's the responsibility of the framework. You're mixing old javascript development techniques (direct dom access/manipulation, html always rendered, selecting things by getElementById, state and markup being mixed, building html strings) <text:s/>with a framework that exists so you never have to do any of that. It's making everything harder for yourself.</text:p>
      <text:p text:style-name="P1"/>
      <text:p text:style-name="P1">You should be rendering your dialog in response to a user action eg clicking on Show Dialog would set @tracked shouldShowDialog = true and your template near that button/tracked state should render the dialog when it's needed.</text:p>
      <text:p text:style-name="P1"/>
      <text:p text:style-name="P1">{{#if this.shouldShowDialog}}</text:p>
      <text:p text:style-name="P1"><text:s text:c="2"/>&lt;DialogInfo @picture={{this.picture}} /&gt;</text:p>
      <text:p text:style-name="P1">{{/if}}</text:p>
      <text:p text:style-name="P1"/>
      <text:p text:style-name="P1"/>
      <text:p text:style-name="P3"><text:span text:style-name="T2">toreric</text:span>TS <text:s/><text:span text:style-name="T1">answer to </text:span><text:span text:style-name="T3">evo</text:span><text:span text:style-name="T5"> 2026-04-17 19:13</text:span></text:p>
      <text:p text:style-name="P1">2026-04-18 15:07</text:p>
      <text:p text:style-name="P1">I'm sorry having asked such questions: shit in =&gt; shit out</text:p>
      <text:p text:style-name="P1"/>
      <text:p text:style-name="P1"/>
      <text:p text:style-name="P1"><text:span text:style-name="T2">NullVoxPopuli</text:span>Rollikon, mods</text:p>
      <text:p text:style-name="P1">2026-04-18 15:15</text:p>
      <text:p text:style-name="P1">Asking is fine ❤️</text:p>
      <text:p text:style-name="P1"/>
      <text:p text:style-name="P1"/>
      <text:p text:style-name="P1"><text:span text:style-name="T2">NullVoxPopuli</text:span>Rollikon, mods</text:p>
      <text:p text:style-name="P1">2026-04-18 15:24</text:p>
      <text:p text:style-name="P1">As with any ai tho, i ask the reader to understand what it is giving them. To prove or disprove the machine. It has no idea what is right or wrong. And it cannot know. Because it doesn't have the ability 'to know'</text:p>
      <text:p text:style-name="P1"/>
      <text:p text:style-name="P1"/>
      <text:p text:style-name="P3"><text:span text:style-name="T2">toreric</text:span>TS <text:s/><text:span text:style-name="T1">answer to </text:span><text:span text:style-name="T3">evo</text:span><text:span text:style-name="T5"> 2026-04-17 19:22</text:span></text:p>
      <text:p text:style-name="P1">2026-04-18 15:25</text:p>
      <text:p text:style-name="P1">Thank you for such a clear overview. I have to consider it in depth, and decide how to go on. Just one idea of mine is to identify cases like this and refactory them into specific components, perhaps within the actual .gjs file (I think that was about your proposal earlier, not much uderstood by me). And in common, work towards the mentioned rules in the future, instead of against them!</text:p>
      <text:p text:style-name="P1"/>
      <text:p text:style-name="P1"/>
      <text:p text:style-name="P1"><text:span text:style-name="T2">evo</text:span>Rollikon, core-cli</text:p>
      <text:p text:style-name="P3">2026-04-18 15:27</text:p>
      <text:p text:style-name="P1">When you are refactoring if you need some help or guidance just post again and we'll do our best to help.</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eorgia" svg:font-family="Georgia" style:font-family-generic="roman"/>
    <style:font-face style:name="Georgia1" svg:font-family="Georgia"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Georgia" fo:font-size="12pt" fo:language="sv" fo:country="S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Georgia" fo:font-size="12pt" fo:language="sv" fo:country="S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Georgia" fo:font-family="Georgia" style:font-family-generic="roman"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Georgia" fo:font-family="Georgia" style:font-family-generic="roman"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Georgia" fo:font-family="Georgia" style:font-family-generic="roman"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Georgia" fo:font-family="Georgia" style:font-family-generic="roman"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401cm" fo:margin-bottom="1cm" fo:margin-left="2.499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6-06-06T23:06:08.806588575</dc:date>
    <meta:editing-duration>PT24M14S</meta:editing-duration>
    <meta:editing-cycles>5</meta:editing-cycles>
    <meta:generator>LibreOffice/24.2.7.2$Linux_X86_64 LibreOffice_project/420$Build-2</meta:generator>
    <meta:print-date>2026-04-18T16:24:19.130062167</meta:print-date>
    <meta:document-statistic meta:table-count="0" meta:image-count="0" meta:object-count="0" meta:page-count="1" meta:paragraph-count="32" meta:word-count="434" meta:character-count="2743" meta:non-whitespace-character-count="2336"/>
  </office:meta>
</office:document-meta>
</file>