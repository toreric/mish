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Heading_20_2">
      <style:text-properties officeooo:paragraph-rsid="0004fcd9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5" style:family="paragraph" style:parent-style-name="Preformatted_20_Text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text-align="start" style:justify-single-word="false"/>
      <style:text-properties officeooo:rsid="0005ee6d" officeooo:paragraph-rsid="0005ee6d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 style:list-style-name="L4"/>
    <style:style style:name="P14" style:family="paragraph" style:parent-style-name="Text_20_body" style:list-style-name="L4">
      <style:paragraph-properties fo:margin-top="0cm" fo:margin-bottom="0cm" style:contextual-spacing="false"/>
    </style:style>
    <style:style style:name="T1" style:family="text">
      <style:text-properties officeooo:rsid="000568d0"/>
    </style:style>
    <style:style style:name="T2" style:family="text">
      <style:text-properties officeooo:rsid="00079851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1. Why you can't scroll to the top or left</text:h>
      <text:p text:style-name="Text_20_body">When you scale an image with</text:p>
      <text:section text:style-name="Sect1" text:name="code-block-viewer">
        <text:p text:style-name="P4"><text:span text:style-name="Source_20_Text">transform: scale(...)</text:span></text:p>
      </text:section>
      <text:p text:style-name="Text_20_body">the browser still lays it out at its original size. The transform is purely visual.</text:p>
      <text:p text:style-name="Text_20_body">Combined with</text:p>
      <text:section text:style-name="Sect1" text:name="Område1">
        <text:p text:style-name="P5"><text:bookmark text:name="code-block-viewer"/><text:span text:style-name="Source_20_Text">display:flex;</text:span></text:p>
        <text:p text:style-name="Preformatted_20_Text"><text:span text:style-name="Source_20_Text">justify-content:center;</text:span></text:p>
        <text:p text:style-name="P3"><text:span text:style-name="Source_20_Text">align-items:center;</text:span></text:p>
      </text:section>
      <text:p text:style-name="Text_20_body">the image is always centered, and the enlarged parts extend equally in all directions. The browser therefore has no scrollable area above or to the left.</text:p>
      <text:p text:style-name="Text_20_body">I'd instead make the page scroll naturally.</text:p>
      <text:p text:style-name="Text_20_body">For example:</text:p>
      <text:section text:style-name="Sect1" text:name="Område2">
        <text:p text:style-name="P5"><text:bookmark text:name="code-block-viewer kopiera 1"/><text:span text:style-name="Source_20_Text">html, body {</text:span></text:p>
        <text:p text:style-name="Preformatted_20_Text"><text:span text:style-name="Source_20_Text"><text:s text:c="4"/>margin: 0;</text:span></text:p>
        <text:p text:style-name="Preformatted_20_Text"><text:span text:style-name="Source_20_Text"><text:s text:c="4"/>background: black;</text:span></text:p>
        <text:p text:style-name="Preformatted_20_Text"><text:span text:style-name="Source_20_Text"><text:s text:c="4"/>overflow: auto;</text:span></text:p>
        <text:p text:style-name="Preformatted_20_Text"><text:span text:style-name="Source_20_Text">}</text:span></text:p>
        <text:p text:style-name="Preformatted_20_Text"/>
        <text:p text:style-name="Preformatted_20_Text"><text:span text:style-name="Source_20_Text">body {</text:span></text:p>
        <text:p text:style-name="Preformatted_20_Text"><text:span text:style-name="Source_20_Text"><text:s text:c="4"/>padding: 20px;</text:span></text:p>
        <text:p text:style-name="Preformatted_20_Text"><text:span text:style-name="Source_20_Text">}</text:span></text:p>
        <text:p text:style-name="Preformatted_20_Text"/>
        <text:p text:style-name="Preformatted_20_Text"><text:span text:style-name="Source_20_Text">#zoom-img {</text:span></text:p>
        <text:p text:style-name="Preformatted_20_Text"><text:span text:style-name="Source_20_Text"><text:s text:c="4"/>display: block;</text:span></text:p>
        <text:p text:style-name="Preformatted_20_Text"><text:span text:style-name="Source_20_Text"><text:s text:c="4"/>transform-origin: top left;</text:span></text:p>
        <text:p text:style-name="P3"><text:span text:style-name="Source_20_Text">}</text:span></text:p>
      </text:section>
      <text:p text:style-name="Text_20_body">Notice:</text:p>
      <text:list text:style-name="L1">
        <text:list-item>
          <text:p text:style-name="P8">no <text:span text:style-name="Source_20_Text">display:flex</text:span> </text:p>
        </text:list-item>
        <text:list-item>
          <text:p text:style-name="P8">no centering </text:p>
        </text:list-item>
        <text:list-item>
          <text:p text:style-name="P7"><text:span text:style-name="Source_20_Text">transform-origin: top left</text:span> </text:p>
        </text:list-item>
      </text:list>
      <text:p text:style-name="Text_20_body">This already feels much more like an image editor.</text:p>
      <text:p text:style-name="Horizontal_20_Line"/>
      <text:h text:style-name="Heading_20_2" text:outline-level="2">2. Clicking should zoom to "100%"</text:h>
      <text:p text:style-name="Text_20_body">You're exactly right.</text:p>
      <text:p text:style-name="Text_20_body">Your current</text:p>
      <text:section text:style-name="Sect1" text:name="Område3">
        <text:p text:style-name="P5"><text:bookmark text:name="code-block-viewer kopiera 2"/><text:span text:style-name="Source_20_Text">img {</text:span></text:p>
        <text:p text:style-name="Preformatted_20_Text"><text:span text:style-name="Source_20_Text"><text:s text:c="4"/>max-width:95vw;</text:span></text:p>
        <text:p text:style-name="Preformatted_20_Text"><text:span text:style-name="Source_20_Text"><text:s text:c="4"/>max-height:95vh;</text:span></text:p>
        <text:p text:style-name="P3"><text:span text:style-name="Source_20_Text">}</text:span></text:p>
      </text:section>
      <text:p text:style-name="Text_20_body"><text:soft-page-break/>means the browser first scales the image to fit the viewport.</text:p>
      <text:p text:style-name="Text_20_body">Then</text:p>
      <text:section text:style-name="Sect1" text:name="Område4">
        <text:p text:style-name="P4"><text:bookmark text:name="code-block-viewer kopiera 3"/><text:span text:style-name="Source_20_Text">scale = 2;</text:span></text:p>
      </text:section>
      <text:p text:style-name="Text_20_body">means</text:p>
      <text:p text:style-name="Quotations">twice the fitted size,</text:p>
      <text:p text:style-name="Text_20_body"><text:span text:style-name="Strong_20_Emphasis">not</text:span></text:p>
      <text:p text:style-name="Quotations">one image pixel per screen pixel.</text:p>
      <text:p text:style-name="Text_20_body">Those are different.</text:p>
      <text:p text:style-name="Horizontal_20_Line"/>
      <text:h text:style-name="Heading_20_3" text:outline-level="3">I would stop using CSS scaling for the base size.</text:h>
      <text:p text:style-name="Text_20_body">Instead:</text:p>
      <text:section text:style-name="Sect1" text:name="Område5">
        <text:p text:style-name="P5"><text:bookmark text:name="code-block-viewer kopiera 4"/><text:span text:style-name="Source_20_Text">img {</text:span></text:p>
        <text:p text:style-name="Preformatted_20_Text"><text:span text:style-name="Source_20_Text"><text:s text:c="4"/>width: auto;</text:span></text:p>
        <text:p text:style-name="Preformatted_20_Text"><text:span text:style-name="Source_20_Text"><text:s text:c="4"/>height: auto;</text:span></text:p>
        <text:p text:style-name="Preformatted_20_Text"><text:span text:style-name="Source_20_Text"><text:s text:c="4"/>max-width: none;</text:span></text:p>
        <text:p text:style-name="Preformatted_20_Text"><text:span text:style-name="Source_20_Text"><text:s text:c="4"/>max-height: none;</text:span></text:p>
        <text:p text:style-name="P3"><text:span text:style-name="Source_20_Text">}</text:span></text:p>
      </text:section>
      <text:p text:style-name="Text_20_body">Now the image is always shown at its intrinsic size.</text:p>
      <text:p text:style-name="Text_20_body">To fit it initially, compute a scale yourself:</text:p>
      <text:section text:style-name="Sect1" text:name="Område6">
        <text:p text:style-name="P5"><text:bookmark text:name="code-block-viewer kopiera 5"/><text:span text:style-name="Source_20_Text">const fitScale = Math.min(</text:span></text:p>
        <text:p text:style-name="Preformatted_20_Text"><text:span text:style-name="Source_20_Text"><text:s text:c="4"/>window.innerWidth / img.naturalWidth,</text:span></text:p>
        <text:p text:style-name="Preformatted_20_Text"><text:span text:style-name="Source_20_Text"><text:s text:c="4"/>window.innerHeight / img.naturalHeight</text:span></text:p>
        <text:p text:style-name="Preformatted_20_Text"><text:span text:style-name="Source_20_Text">);</text:span></text:p>
        <text:p text:style-name="Preformatted_20_Text"/>
        <text:p text:style-name="P3"><text:span text:style-name="Source_20_Text">scale = fitScale;</text:span></text:p>
      </text:section>
      <text:p text:style-name="Text_20_body">Now:</text:p>
      <text:list text:style-name="L2">
        <text:list-item>
          <text:p text:style-name="P10">initial view = "fit to window" </text:p>
        </text:list-item>
        <text:list-item>
          <text:p text:style-name="P10"><text:span text:style-name="Source_20_Text">scale = 1</text:span> = true 100% </text:p>
        </text:list-item>
        <text:list-item>
          <text:p text:style-name="P9"><text:span text:style-name="Source_20_Text">scale = 2</text:span> = 200% </text:p>
        </text:list-item>
      </text:list>
      <text:p text:style-name="Text_20_body">This is how Photoshop, GIMP, Preview, etc., all work.</text:p>
      <text:p text:style-name="Horizontal_20_Line"/>
      <text:h text:style-name="P2" text:outline-level="2">3. Zoom where the mouse clicks</text:h>
      <text:p text:style-name="Text_20_body">This is a fun one.</text:p>
      <text:p text:style-name="Text_20_body">Suppose the user clicks</text:p>
      <text:section text:style-name="Sect1" text:name="Område7">
        <text:p text:style-name="P5"><text:bookmark text:name="code-block-viewer kopiera 6"/><text:span text:style-name="Source_20_Text">event.clientX</text:span></text:p>
        <text:p text:style-name="P3"><text:span text:style-name="Source_20_Text">event.clientY</text:span></text:p>
      </text:section>
      <text:p text:style-name="Text_20_body"><text:soft-page-break/>before zooming.</text:p>
      <text:p text:style-name="Text_20_body">After changing the scale you want that same image point to remain under the mouse.</text:p>
      <text:p text:style-name="Text_20_body">The algorithm is:</text:p>
      <text:list text:style-name="L3">
        <text:list-item>
          <text:p text:style-name="P12">determine the clicked point in image coordinates </text:p>
        </text:list-item>
        <text:list-item>
          <text:p text:style-name="P12">change scale </text:p>
        </text:list-item>
        <text:list-item>
          <text:p text:style-name="P12">adjust <text:span text:style-name="Source_20_Text">scrollLeft</text:span> </text:p>
        </text:list-item>
        <text:list-item>
          <text:p text:style-name="P11">adjust <text:span text:style-name="Source_20_Text">scrollTop</text:span> </text:p>
        </text:list-item>
      </text:list>
      <text:p text:style-name="Text_20_body">For example:</text:p>
      <text:section text:style-name="Sect1" text:name="Område8">
        <text:p text:style-name="P5"><text:bookmark text:name="code-block-viewer kopiera 7"/><text:span text:style-name="Source_20_Text">const rect = img.getBoundingClientRect();</text:span></text:p>
        <text:p text:style-name="Preformatted_20_Text"/>
        <text:p text:style-name="Preformatted_20_Text"><text:span text:style-name="Source_20_Text">const x = (event.clientX - rect.left) / scale;</text:span></text:p>
        <text:p text:style-name="Preformatted_20_Text"><text:span text:style-name="Source_20_Text">const y = (event.clientY - rect.top) / scale;</text:span></text:p>
        <text:p text:style-name="Preformatted_20_Text"/>
        <text:p text:style-name="Preformatted_20_Text"><text:span text:style-name="Source_20_Text">scale = 1; <text:s text:c="5"/>// or 2 etc.</text:span></text:p>
        <text:p text:style-name="Preformatted_20_Text"/>
        <text:p text:style-name="Preformatted_20_Text"><text:span text:style-name="Source_20_Text">img.style.transform = `scale(${scale})`;</text:span></text:p>
        <text:p text:style-name="Preformatted_20_Text"/>
        <text:p text:style-name="Preformatted_20_Text"><text:span text:style-name="Source_20_Text">window.scrollTo(</text:span></text:p>
        <text:p text:style-name="Preformatted_20_Text"><text:span text:style-name="Source_20_Text"><text:s text:c="4"/>x * scale - window.innerWidth / 2,</text:span></text:p>
        <text:p text:style-name="Preformatted_20_Text"><text:span text:style-name="Source_20_Text"><text:s text:c="4"/>y * scale - window.innerHeight / 2</text:span></text:p>
        <text:p text:style-name="P3"><text:span text:style-name="Source_20_Text">);</text:span></text:p>
      </text:section>
      <text:p text:style-name="Text_20_body">The clicked point ends up in the middle of the viewport.</text:p>
      <text:p text:style-name="Text_20_body">That's exactly how Google Maps and many image viewers behave.</text:p>
      <text:p text:style-name="Horizontal_20_Line"/>
      <text:h text:style-name="Heading_20_2" text:outline-level="2">What I'd recommend</text:h>
      <text:p text:style-name="Text_20_body">I think your viewer is approaching the point where it's worth borrowing the interaction model of a dedicated image viewer:</text:p>
      <text:list text:style-name="L4">
        <text:list-item>
          <text:p text:style-name="P14">initial display = fit to window </text:p>
        </text:list-item>
        <text:list-item>
          <text:p text:style-name="P14"><text:span text:style-name="Source_20_Text">1</text:span> key = 100% </text:p>
        </text:list-item>
        <text:list-item>
          <text:p text:style-name="P14"><text:span text:style-name="Source_20_Text">0</text:span> key = fit to window </text:p>
        </text:list-item>
        <text:list-item>
          <text:p text:style-name="P14"><text:span text:style-name="Source_20_Text">+</text:span>/<text:span text:style-name="Source_20_Text">-</text:span> = zoom in/out </text:p>
        </text:list-item>
        <text:list-item>
          <text:p text:style-name="P14">mouse click = zoom to 100% at clicked point </text:p>
        </text:list-item>
        <text:list-item>
          <text:p text:style-name="P14">mouse wheel + Ctrl = zoom </text:p>
        </text:list-item>
        <text:list-item>
          <text:p text:style-name="P14">click-and-drag = pan when zoomed </text:p>
        </text:list-item>
        <text:list-item>
          <text:p text:style-name="P13">space bar temporarily enables panning (like Photoshop) </text:p>
        </text:list-item>
      </text:list>
      <text:p text:style-name="Text_20_body">Those features all work together naturally, and your current code is already close. I think with another 50–100 lines of JavaScript you could have a viewer that feels surprisingly polished while still keeping everything inside your <text:span text:style-name="Source_20_Text">buttons-right.gjs</text:span> component.</text:p>
      <text:p text:style-name="P6"><text:line-break/><text:file-name text:display="full" text:fixed="true">/home/tore/Arbeten/mish/image_viewer.odt</text:file-name><text:tab/><text:span text:style-name="T2"><text:tab/><text:tab/><text:tab/> <text:s text:c="10"/></text:span>Chat GPT 2026-07-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eorgia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Georgia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eorgia" fo:font-family="Georgia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officeooo:rsid="000568d0"/>
    </style:style>
    <style:page-layout style:name="Mpm1">
      <style:page-layout-properties fo:page-width="21.001cm" fo:page-height="29.7cm" style:num-format="1" style:print-orientation="portrait" fo:margin-top="2.401cm" fo:margin-bottom="2cm" fo:margin-left="2.499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tru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text:s/><text:span text:style-name="MT1">(</text:span><text:span text:style-name="MT1"><text:page-count>3</text:page-count></text:span><text:span text:style-name="MT1">) <text:s text:c="4"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11T14:58:12.966236787</meta:creation-date>
    <dc:date>2026-07-11T15:31:04.041421351</dc:date>
    <meta:editing-duration>PT21M46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3" meta:paragraph-count="100" meta:word-count="492" meta:character-count="2957" meta:non-whitespace-character-count="2477"/>
  </office:meta>
</office:document-meta>
</file>